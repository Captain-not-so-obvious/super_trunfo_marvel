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6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teligência</text:p>
          </table:table-cell>
          <table:table-cell office:value-type="string" calcext:value-type="string">
            <text:p>Força</text:p>
          </table:table-cell>
          <table:table-cell office:value-type="string" calcext:value-type="string">
            <text:p>Velocidade</text:p>
          </table:table-cell>
          <table:table-cell office:value-type="string" calcext:value-type="string">
            <text:p>Durabilidade</text:p>
          </table:table-cell>
          <table:table-cell office:value-type="string" calcext:value-type="string">
            <text:p>Projeção de Energia</text:p>
          </table:table-cell>
          <table:table-cell office:value-type="string" calcext:value-type="string">
            <text:p>Combate</text:p>
          </table:table-cell>
        </table:table-row>
        <table:table-row table:style-name="ro1">
          <table:table-cell office:value-type="string" calcext:value-type="string">
            <text:p>Marvel Azu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m Warlo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ut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inha-Aranh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Peregri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tru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mem de Ferr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ota-Aranh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k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hema, a Ouvinte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o B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 Ulrich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io Negr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itão Aval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wa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nátic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itã Marv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essor 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ia de Sed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nifici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vião Arqueir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istalys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valeiro Neg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nho de Fer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rren Cro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ota Esqui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rmammu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win Jarvi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kt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itã Britâni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inha Branc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 Sabah Nu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vejan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ente Anti-Ven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a Neg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g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zuc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lactus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ót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.O.D.O.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en Stacy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m-Formiga ( Hank Pym 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ward Stark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dado Inve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áquina de Comba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e Foster ( Thor 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sp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 Sitwe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lher-Aranh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ssica Jo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veira Vermelh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. Jonah James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toqueiro Fantasm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cha Hum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ente America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magador Hog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ha Escarl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ss Marvel ( Kamala Khan 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átrid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ako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ur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cão Notur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lverine ( X-23 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ke Ca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orpiã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itão Marv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ggy Cart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Hi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a Stark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y Jane Watso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molid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gne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ectr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fisto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ha Escarlate ( Michael Van Patrick 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m-Aranha ( Miguel O’Hara 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c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ect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mo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úva Neg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valeiro Neg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nhor Sinistr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ng, O Conquistad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k Fu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k Fury Jr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ende Verde ( Norman Osborn 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rfista Pratead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e de Fer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in Bors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mpesta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tor Octopu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m Molecul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m-Aranh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r Lo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 Sheld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 Coulson ( Morte )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ertado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gnaro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ísti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hor Fantástic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bit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piral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m de Gel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ntinela ( Sentry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orista Fantasm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cket Raco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va ( Samuel Alexander 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itão América ( Sam Wilson 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m-Formiga ( Scott Lang 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clop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aven, O Caçad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ng-Ch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ri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tor Estranh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itão Améri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lher Invisív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tera Neg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itã Univers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g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lk Vermelh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n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jo ( Thomas Holloway 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or Odin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amut, Celestial Sonhador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 Vigia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eria Richard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tes de Sab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utor Destin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adp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iticeira Escarlat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anj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i do Crim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ão Von Stru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mem-Púrpur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pér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5:35:55.9776749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8:59:46.744514483</meta:creation-date>
    <dc:date>2026-06-09T18:21:22.496571023</dc:date>
    <meta:editing-duration>PT2H18M17S</meta:editing-duration>
    <meta:editing-cycles>14</meta:editing-cycles>
    <meta:generator>LibreOffice/26.2.2.2$Linux_X86_64 LibreOffice_project/620$Build-2</meta:generator>
    <meta:document-statistic meta:table-count="1" meta:cell-count="1057" meta:object-count="0"/>
  </office:meta>
</office:document-meta>
</file>